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80000001813BAB7A13A064E2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paragraph-rsid="0015c7f5"/>
    </style:style>
    <style:style style:name="P2" style:family="paragraph" style:parent-style-name="Preformatted_20_Text">
      <style:text-properties style:font-name="Times New Roman" fo:font-size="14pt" style:font-size-asian="14pt" style:font-size-complex="14pt"/>
    </style:style>
    <style:style style:name="P3" style:family="paragraph" style:parent-style-name="Preformatted_20_Text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Preformatted_20_Text">
      <style:text-properties style:font-name="Times New Roman" fo:font-size="14pt" officeooo:paragraph-rsid="0017c308" style:font-size-asian="14pt" style:font-size-complex="14pt"/>
    </style:style>
    <style:style style:name="P5" style:family="paragraph" style:parent-style-name="Preformatted_20_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Preformatted_20_Text">
      <style:paragraph-properties fo:text-align="end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Preformatted_20_Text">
      <style:paragraph-properties fo:text-align="end" style:justify-single-word="false"/>
      <style:text-properties style:font-name="Times New Roman" fo:font-size="14pt" fo:font-weight="bold" officeooo:paragraph-rsid="0015c7f5" style:font-size-asian="14pt" style:font-weight-asian="bold" style:font-size-complex="14pt" style:font-weight-complex="bold"/>
    </style:style>
    <style:style style:name="P8" style:family="paragraph" style:parent-style-name="Preformatted_20_Text">
      <style:paragraph-properties fo:text-align="center" style:justify-single-word="false"/>
      <style:text-properties style:font-name="Times New Roman" fo:font-size="18pt" fo:font-weight="bold" officeooo:rsid="0017c308" officeooo:paragraph-rsid="0017c308" style:font-size-asian="18pt" style:font-weight-asian="bold" style:font-size-complex="18pt" style:font-weight-complex="bold"/>
    </style:style>
    <style:style style:name="P9" style:family="paragraph" style:parent-style-name="Preformatted_20_Text">
      <style:text-properties style:font-name="Times New Roman" fo:font-size="20pt" style:font-size-asian="20pt" style:font-size-complex="20pt"/>
    </style:style>
    <style:style style:name="P10" style:family="paragraph" style:parent-style-name="Preformatted_20_Text">
      <style:paragraph-properties fo:text-align="center" style:justify-single-word="false"/>
      <style:text-properties style:font-name="Times New Roman" fo:font-size="22pt" fo:language="ru" fo:country="RU" fo:font-weight="bold" officeooo:rsid="0017c308" officeooo:paragraph-rsid="0017c308" style:font-size-asian="22pt" style:font-weight-asian="bold" style:font-size-complex="22pt" style:font-weight-complex="bold"/>
    </style:style>
    <style:style style:name="P11" style:family="paragraph" style:parent-style-name="Preformatted_20_Text">
      <style:text-properties style:font-name="Times New Roman" fo:font-size="16pt" style:font-size-asian="16pt" style:font-size-complex="16pt"/>
    </style:style>
    <style:style style:name="P12" style:family="paragraph" style:parent-style-name="Preformatted_20_Text">
      <style:paragraph-properties fo:text-align="end" style:justify-single-word="false"/>
      <style:text-properties fo:font-size="14pt" style:font-size-asian="14pt" style:font-size-complex="14pt"/>
    </style:style>
    <style:style style:name="P13" style:family="paragraph" style:parent-style-name="Preformatted_20_Text">
      <style:paragraph-properties fo:margin-left="0cm" fo:margin-right="0cm" fo:text-indent="0cm" style:auto-text-indent="false"/>
      <style:text-properties style:font-name="Times New Roman" fo:font-size="16pt" style:font-size-asian="16pt" style:font-size-complex="16pt"/>
    </style:style>
    <style:style style:name="P14" style:family="paragraph" style:parent-style-name="Preformatted_20_Text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Preformatted_20_Text">
      <style:paragraph-properties fo:margin-left="0cm" fo:margin-right="0cm" fo:text-align="center" style:justify-single-word="false" fo:text-indent="0cm" style:auto-text-indent="false"/>
      <style:text-properties style:font-name="Times New Roman" fo:font-size="11pt" fo:font-style="normal" fo:font-weight="bold" officeooo:rsid="0015c7f5" style:font-size-asian="9.60000038146973pt" style:font-style-asian="normal" style:font-weight-asian="bold" style:font-size-complex="11pt" style:font-style-complex="normal" style:font-weight-complex="bold"/>
    </style:style>
    <style:style style:name="P16" style:family="paragraph" style:parent-style-name="Preformatted_20_Text">
      <style:paragraph-properties fo:text-align="center" style:justify-single-word="false"/>
      <style:text-properties style:font-name="Times New Roman" fo:font-size="14pt" officeooo:paragraph-rsid="0015c7f5" style:font-size-asian="14pt" style:font-size-complex="14pt"/>
    </style:style>
    <style:style style:name="P17" style:family="paragraph" style:parent-style-name="Preformatted_20_Text">
      <style:paragraph-properties fo:text-align="end" style:justify-single-word="false"/>
      <style:text-properties style:font-name="Times New Roman" fo:font-size="14pt" fo:font-weight="normal" officeooo:rsid="0015c7f5" style:font-size-asian="14pt" style:font-weight-asian="normal" style:font-size-complex="14pt" style:font-weight-complex="normal"/>
    </style:style>
    <style:style style:name="P18" style:family="paragraph" style:parent-style-name="Preformatted_20_Text">
      <style:paragraph-properties fo:text-align="end" style:justify-single-word="false"/>
      <style:text-properties style:font-name="Times New Roman" fo:font-size="14pt" fo:font-weight="normal" officeooo:rsid="0015c7f5" officeooo:paragraph-rsid="0015c7f5" style:font-size-asian="14pt" style:font-weight-asian="normal" style:font-size-complex="14pt" style:font-weight-complex="normal"/>
    </style:style>
    <style:style style:name="P19" style:family="paragraph" style:parent-style-name="Preformatted_20_Text">
      <style:paragraph-properties fo:text-align="center" style:justify-single-word="false"/>
      <style:text-properties style:font-name="Times New Roman" fo:font-size="28pt" fo:font-weight="bold" officeooo:rsid="0015c7f5" style:font-size-asian="28pt" style:font-weight-asian="bold" style:font-size-complex="28pt" style:font-weight-complex="bold"/>
    </style:style>
    <style:style style:name="P20" style:family="paragraph" style:parent-style-name="Preformatted_20_Text">
      <style:text-properties style:font-name="Times New Roman" fo:font-size="16pt" style:font-size-asian="16pt" style:font-size-complex="16pt"/>
    </style:style>
    <style:style style:name="P21" style:family="paragraph" style:parent-style-name="Preformatted_20_Text">
      <style:text-properties style:font-name="Times New Roman" fo:font-size="16pt" fo:language="en" fo:country="US" officeooo:rsid="001a4bf8" officeooo:paragraph-rsid="001a4bf8" style:font-size-asian="16pt" style:font-size-complex="16pt"/>
    </style:style>
    <style:style style:name="P22" style:family="paragraph" style:parent-style-name="Preformatted_20_Text">
      <style:text-properties style:font-name="Times New Roman" fo:font-size="16pt" fo:language="ru" fo:country="RU" officeooo:rsid="001a4bf8" officeooo:paragraph-rsid="001a4bf8" style:font-size-asian="16pt" style:font-size-complex="16pt"/>
    </style:style>
    <style:style style:name="T1" style:family="text">
      <style:text-properties style:font-name="Times New Roman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style:font-name="Times New Roman" fo:font-size="36pt" fo:font-style="normal" fo:font-weight="bold" officeooo:rsid="0015c7f5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officeooo:rsid="0015c7f5"/>
    </style:style>
    <style:style style:name="T5" style:family="text">
      <style:text-properties fo:language="en" fo:country="US" officeooo:rsid="0017c308"/>
    </style:style>
    <style:style style:name="T6" style:family="text">
      <style:text-properties fo:language="ru" fo:country="RU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5c7f5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officeooo:rsid="0017c308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<text:s/>КУРСОВАЯ РАБОТ</text:span><text:span text:style-name="T2">А</text:span></text:p>
      <text:p text:style-name="P15"/>
      <text:p text:style-name="P3">Разработка приложения для управления складским учётом</text:p>
      <text:p text:style-name="P16"><text:s text:c="5"/>на основе технологии Avalonia UI и .NET</text:p>
      <text:p text:style-name="P16"/>
      <text:p text:style-name="P16"/>
      <text:p text:style-name="P1"><text:span text:style-name="T3"><draw:frame draw:style-name="fr1" draw:name="Изображение1" text:anchor-type="as-char" svg:width="0.635cm" svg:height="0.635cm" draw:z-index="0"><draw:image xlink:href="Pictures/10000201000000180000001813BAB7A13A064E2A.png" xlink:type="simple" xlink:show="embed" xlink:actuate="onLoad" loext:mime-type="image/png"/></draw:frame></text:span><text:span text:style-name="T3"><text:s/>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7">Выполнил: <text:s/><text:span text:style-name="T7">студент г</text:span><text:span text:style-name="T8">руппы П511</text:span></text:p>
      <text:p text:style-name="P18">Тугумов Тимур Артурович</text:p>
      <text:p text:style-name="P5"/>
      <text:p text:style-name="P6"><text:s text:c="2"/><text:span text:style-name="T4">Преподаватель</text:span>: <text:span text:style-name="T8">Тимохин Иван Александрович</text:span></text:p>
      <text:p text:style-name="P17"/>
      <text:p text:style-name="P17"/>
      <text:p text:style-name="P17"/>
      <text:p text:style-name="P17"/>
      <text:p text:style-name="P17"/>
      <text:p text:style-name="P12"/>
      <text:p text:style-name="P12"/>
      <text:p text:style-name="P19">ПЕРМЬ 2026</text:p>
      <text:p text:style-name="Preformatted_20_Text"/>
      <text:p text:style-name="Preformatted_20_Text"/>
      <text:p text:style-name="Preformatted_20_Text"/>
      <text:p text:style-name="P2"><text:soft-page-break/><text:span text:style-name="T9">Проект:</text:span> <text:s text:c="6"/><text:span text:style-name="T11">StockWise</text:span> - Система управления складом</text:p>
      <text:p text:style-name="P2"><text:span text:style-name="T9">Платформа:</text:span> <text:s text:c="3"/>Desktop-приложение (кр<text:span text:style-name="T12">о</text:span>ссплатформенное)</text:p>
      <text:p text:style-name="P2"><text:span text:style-name="T9">Стек:</text:span> <text:s text:c="8"/><text:span text:style-name="T9">C# / .NET 10 / Avalonia UI 11.3</text:span></text:p>
      <text:p text:style-name="P5"><text:s text:c="14"/>EF Core + Dapper / SQL Server LocalDB</text:p>
      <text:p text:style-name="P5"/>
      <text:p text:style-name="P8">ЦЕЛИ И ЗАДАЧИ</text:p>
      <text:p text:style-name="P2"><text:s text:c="11"/></text:p>
      <text:p text:style-name="P2"><text:span text:style-name="T9">Цель</text:span>: <text:s/>Разработка функционального десктоп-приложения для управления <text:s text:c="18"/>складским учётом на предприятии, обеспечивающего</text:p>
      <text:p text:style-name="P2">контроль остатков, документооборот, аналитику и ролевой доступ.</text:p>
      <text:p text:style-name="P2"/>
      <text:p text:style-name="P2">Задачи:</text:p>
      <text:p text:style-name="P2"><text:s text:c="2"/>1. Проектирование архитектуры приложения по паттерну MVVM</text:p>
      <text:p text:style-name="P2"><text:s text:c="2"/>2. Реализация модели данных (21 сущность) </text:p>
      <text:p text:style-name="P2"><text:s text:c="2"/>3. Разработка системы авторизации с ролевым доступом (RBAC)</text:p>
      <text:p text:style-name="P2"><text:s text:c="2"/>4. Реализация двойных проводок для движения товара</text:p>
      <text:p text:style-name="P2"><text:s text:c="2"/>5. Разработка документооборота (приход, расход, перемещение)</text:p>
      <text:p text:style-name="P2"><text:s text:c="2"/>6. Реализация управления заказами с резервированием</text:p>
      <text:p text:style-name="P2"><text:s text:c="2"/>7. Разработка модуля инвентаризации</text:p>
      <text:p text:style-name="P2"><text:s text:c="2"/>8. Создание аналитических отчётов (ABC-анализ, оборотно-сальдовая)</text:p>
      <text:p text:style-name="P2"/>
      <text:p text:style-name="P2"><text:s text:c="25"/><text:span text:style-name="T13">ФУНКЦИОНАЛЬНЫЕ ВОЗМОЖНОСТИ</text:span></text:p>
      <text:p text:style-name="P2"/>
      <text:p text:style-name="P2"><text:s text:c="2"/><text:span text:style-name="T12">1.</text:span> Авторизация и ролевая модель (Admin, Manager, Warehouse, Viewer)</text:p>
      <text:p text:style-name="P2"><text:s text:c="2"/><text:span text:style-name="T12">2.</text:span> Номенклатура товаров с категориями (дерево), артикулами</text:p>
      <text:p text:style-name="P2"><text:s text:c="2"/><text:span text:style-name="T12">3. </text:span>Управление складами и остатками в реальном времени</text:p>
      <text:p text:style-name="P2"><text:s text:c="2"/><text:span text:style-name="T12">4. </text:span>Документооборот: приходные, расходные, перемещения между складами</text:p>
      <text:p text:style-name="P2"><text:s text:c="2"/><text:span text:style-name="T12">5.</text:span> Двойные проводки - каждое движение = 2 строки Transactio<text:span text:style-name="T5">n</text:span></text:p>
      <text:p text:style-name="P2"><text:s text:c="2"/><text:span text:style-name="T5">6. </text:span>Заказы клиентов с резервированием </text:p>
      <text:p text:style-name="P2"><text:s text:c="2"/><text:span text:style-name="T5">7.</text:span> ABC-анализ товаров по сумме продаж</text:p>
      <text:p text:style-name="P2"><text:s text:c="2"/><text:span text:style-name="T5">8.</text:span> Оборотно-сальдовая ведомость за период</text:p>
      <text:p text:style-name="P2"><text:s text:c="2"/><text:span text:style-name="T5">9. </text:span>CRUD-операции для пользователей, складов, контрагентов</text:p>
      <text:p text:style-name="P2"><text:s text:c="2"/><text:span text:style-name="T5">10. </text:span>Тёмная/светлая тема</text:p>
      <text:p text:style-name="P2"><text:s text:c="2"/><text:span text:style-name="T5">11. </text:span>Toast-уведомления</text:p>
      <text:p text:style-name="P2"/>
      <text:p text:style-name="P2"><text:s text:c="26"/><text:span text:style-name="T13">ИСПОЛЬЗУЕМЫЕ ТЕХНОЛОГИИ</text:span></text:p>
      <text:p text:style-name="P2"/>
      <text:p text:style-name="P2"><text:s text:c="2"/><text:span text:style-name="T9">Язык:</text:span> <text:s text:c="17"/>C# 12 / .NET 10</text:p>
      <text:p text:style-name="P2"><text:s text:c="2"/><text:span text:style-name="T9">UI-фреймворк:</text:span> <text:s text:c="9"/>Avalonia UI 11.3 (<text:span text:style-name="T6">кр</text:span><text:span text:style-name="T5">о</text:span><text:span text:style-name="T6">ссплатформенный</text:span>)</text:p>
      <text:p text:style-name="P2"><text:s text:c="2"/><text:span text:style-name="T9">Паттерн MVVM:</text:span> <text:s text:c="9"/>CommunityToolkit.Mvvm</text:p>
      <text:p text:style-name="P2"><text:s text:c="2"/><text:span text:style-name="T9">ORM:</text:span> <text:s text:c="18"/>Entity Framework Core</text:p>
      <text:p text:style-name="P2"><text:s text:c="2"/><text:span text:style-name="T9">Микро-ORM:</text:span> <text:s text:c="12"/>Dapper</text:p>
      <text:p text:style-name="P4"><text:s/><text:span text:style-name="T9"><text:s/>БД: </text:span><text:s text:c="19"/>SQL Server LocalD<text:span text:style-name="T5">B</text:span></text:p>
      <text:p text:style-name="P4"><text:s text:c="2"/><text:span text:style-name="T9">Хэширование: </text:span><text:s text:c="9"/>Bcryp<text:span text:style-name="T5">t.Next</text:span></text:p>
      <text:p text:style-name="P10"><text:soft-page-break/>РЕЗУЛЬТАТЫ</text:p>
      <text:p text:style-name="P9"/>
      <text:p text:style-name="P2"><text:s text:c="2"/><text:span text:style-name="T10">Разработано функциональное desktop-приложение StockWise,</text:span></text:p>
      <text:p text:style-name="P11"><text:s text:c="2"/>обеспечивающее полный цикл складского учёта: от поступления</text:p>
      <text:p text:style-name="P11"><text:s text:c="2"/><text:span text:style-name="T12">Т</text:span>овара на склад до формирования аналитических отчётов.</text:p>
      <text:p text:style-name="P13"><text:s text:c="2"/>Приложение поддерживает многопользовательский режим с <text:s text:c="5"/>ролевым разграничением доступа и обеспечивает контроль </text:p>
      <text:p text:style-name="P11"><text:s/><text:span text:style-name="T12">остатков, </text:span>документооборот, заказы, инвентаризацию и аналитику.</text:p>
      <text:p text:style-name="P11"/>
      <text:p text:style-name="P11"/>
      <text:p text:style-name="P11"/>
      <text:p text:style-name="P11"/>
      <text:p text:style-name="P22">Логины и пароли:</text:p>
      <text:p text:style-name="P21">Admin – <text:span text:style-name="T6">Логин: </text:span>admin, <text:span text:style-name="T6">Пароль: </text:span>Admin123!</text:p>
      <text:p text:style-name="P21">Manager – <text:span text:style-name="T6">Логин: m</text:span>anager, <text:span text:style-name="T6">Пароль: </text:span>Manager123!</text:p>
      <text:p text:style-name="P21">Warehouse – <text:span text:style-name="T6">Логин: w</text:span>arehouse, <text:span text:style-name="T6">Пароль: </text:span>Warehouse123!</text:p>
      <text:p text:style-name="P21">Viewer – <text:span text:style-name="T6">Логин: v</text:span>iewer, <text:span text:style-name="T6">Пароль: </text:span>Viewer123!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7-11T02:30:24.583000000</dc:date>
    <meta:editing-duration>PT48M39S</meta:editing-duration>
    <meta:editing-cycles>2</meta:editing-cycles>
    <meta:generator>LibreOffice/5.4.7.2$Windows_x86 LibreOffice_project/c838ef25c16710f8838b1faec480ebba495259d0</meta:generator>
    <meta:document-statistic meta:table-count="0" meta:image-count="1" meta:object-count="0" meta:page-count="3" meta:paragraph-count="56" meta:word-count="283" meta:character-count="2589" meta:non-whitespace-character-count="2072"/>
  </office:meta>
</office:document-meta>
</file>